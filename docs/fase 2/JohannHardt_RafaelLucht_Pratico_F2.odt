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9900000277CF4EDA5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706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212cm" style:contextual-spacing="false" fo:text-align="justify" style:justify-single-word="false" loext:word-spacing-minimum="75%" loext:word-spacing-maximum="133%"/>
    </style:style>
    <style:style style:name="P4" style:family="paragraph" style:parent-style-name="Standard">
      <style:paragraph-properties fo:margin-top="0cm" fo:margin-bottom="0.141cm" style:contextual-spacing="false"/>
    </style:style>
    <style:style style:name="P5" style:family="paragraph" style:parent-style-name="List_20_Paragraph" style:list-style-name="WWNum2">
      <style:paragraph-properties fo:margin-top="0cm" fo:margin-bottom="0.071cm" style:contextual-spacing="false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Heading_20_1">
      <style:paragraph-properties fo:margin-top="0cm" fo:margin-bottom="0.212cm" style:contextual-spacing="false" fo:break-before="page"/>
    </style:style>
    <style:style style:name="P8" style:family="paragraph" style:parent-style-name="Standard">
      <style:paragraph-properties fo:margin-top="0.141cm" fo:margin-bottom="0.212cm" style:contextual-spacing="false" fo:text-align="justify" style:justify-single-word="false" loext:word-spacing-minimum="75%" loext:word-spacing-maximum="133%"/>
    </style:style>
    <style:style style:name="P9" style:family="paragraph" style:parent-style-name="Standard">
      <style:paragraph-properties fo:margin-top="0cm" fo:margin-bottom="0.141cm" style:contextual-spacing="false" fo:text-align="center" style:justify-single-word="false"/>
      <style:text-properties fo:color="#888888" loext:opacity="100%"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12" style:family="paragraph" style:parent-style-name="Standard">
      <style:paragraph-properties fo:margin-top="0cm" fo:margin-bottom="0.176cm" style:contextual-spacing="false" fo:text-align="justify" style:justify-single-word="false" loext:word-spacing-minimum="75%" loext:word-spacing-maximum="133%"/>
    </style:style>
    <style:style style:name="P13" style:family="paragraph" style:parent-style-name="Standard">
      <style:paragraph-properties fo:margin-top="0cm" fo:margin-bottom="0.106cm" style:contextual-spacing="false"/>
    </style:style>
    <style:style style:name="T1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1pt" style:font-name-asian="Times New Roman2" style:font-size-asian="11pt" style:font-name-complex="Times New Roman2" style:font-size-complex="11pt"/>
    </style:style>
    <style:style style:name="T4" style:family="text"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T5" style:family="text">
      <style:text-properties style:font-name="Times New Roman" fo:font-size="10pt" fo:font-style="italic" officeooo:rsid="00023fcc" style:font-name-asian="Times New Roman2" style:font-size-asian="10pt" style:font-style-asian="italic" style:font-name-complex="Times New Roman2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lho Prático — Desenvolvimento de Software</text:span></text:p>
      <text:p text:style-name="P1"><text:span text:style-name="T2">Entrega Parcial (Fase 2)</text:span></text:p>
      <text:p text:style-name="P2"><text:span text:style-name="T2">Johann Hardt &amp; Rafael Lucht</text:span></text:p>
      <text:h text:style-name="Heading_20_1" text:outline-level="1">1 <text:s text:c="2"/>Requisitos</text:h>
      <text:p text:style-name="P3"><text:span text:style-name="T3">Abaixo estão listadas as funcionalidades de que o aplicativo deverá dispor, incluindo os requisitos originais da Fase 1 e os novos requisitos incorporados na Fase 2. Cada requisito é rotulado como FUNCIONAL (F) ou NÃO-FUNCIONAL (NF).</text:span></text:p>
      <text:h text:style-name="Heading_20_2" text:outline-level="2">1.1 <text:s text:c="2"/>Configurações iniciais</text:h>
      <text:p text:style-name="P4"><text:span text:style-name="T3">O sistema deverá ser inicializado com valores pré-definidos dos seguintes parâmetros:</text:span></text:p>
      <text:list text:style-name="WWNum2">
        <text:list-item text:start-value="1">
          <text:p text:style-name="P5"><text:span text:style-name="T3">instrumento inicial;</text:span></text:p>
        </text:list-item>
        <text:list-item>
          <text:p text:style-name="P5"><text:span text:style-name="T3">oitava inicial;</text:span></text:p>
        </text:list-item>
        <text:list-item>
          <text:p text:style-name="P5"><text:span text:style-name="T3">volume;</text:span></text:p>
        </text:list-item>
        <text:list-item>
          <text:p text:style-name="P5"><text:span text:style-name="T3">BPM;</text:span></text:p>
        </text:list-item>
      </text:list>
      <text:p text:style-name="P6"><text:span text:style-name="T3">os quais poderão ser alterados pelo usuário.</text:span></text:p>
      <text:h text:style-name="Heading_20_2" text:outline-level="2">1.2 <text:s text:c="2"/>Interações com o usuário</text:h>
      <text:p text:style-name="P4"><text:span text:style-name="T3">O sistema deverá permitir que o usuário:</text:span></text:p>
      <text:list text:continue-numbering="true" text:style-name="WWNum2">
        <text:list-item>
          <text:p text:style-name="P5"><text:span text:style-name="T3">forneça uma entrada de texto, via teclado ou um arquivo “.txt”;</text:span></text:p>
        </text:list-item>
        <text:list-item>
          <text:p text:style-name="P5"><text:span text:style-name="T3">redefina os parâmetros padrão de áudio (instrumento e oitava iniciais);</text:span></text:p>
        </text:list-item>
        <text:list-item>
          <text:p text:style-name="P5"><text:span text:style-name="T3">ajuste a qualquer momento as configurações de áudio (volume e BPM) via elementos interativos;</text:span></text:p>
        </text:list-item>
        <text:list-item>
          <text:p text:style-name="P5"><text:span text:style-name="T3">consulte à demanda o mapeamento “caractere → evento”;</text:span></text:p>
        </text:list-item>
        <text:list-item>
          <text:p text:style-name="P5"><text:span text:style-name="T3">restaure as configurações padrão do sistema;</text:span></text:p>
        </text:list-item>
        <text:list-item>
          <text:p text:style-name="P5"><text:span text:style-name="T3">desencadeie a reprodução de áudio quando houver um texto disponível;</text:span></text:p>
        </text:list-item>
        <text:list-item>
          <text:p text:style-name="P5"><text:span text:style-name="T3">pause/retome, reinicie ou aborte a reprodução de áudio em qualquer instante desta.</text:span></text:p>
        </text:list-item>
      </text:list>
      <text:h text:style-name="Heading_20_2" text:outline-level="2">1.3 <text:s text:c="2"/>Conversão de texto e reprodução de áudio</text:h>
      <text:p text:style-name="P4"><text:span text:style-name="T3">Após receber o texto do usuário, o sistema deverá:</text:span></text:p>
      <text:list text:continue-numbering="true" text:style-name="WWNum2">
        <text:list-item>
          <text:p text:style-name="P5"><text:span text:style-name="T3">interpretar o texto, aplicando o mapeamento de caracteres para lê-lo como uma partitura;</text:span></text:p>
        </text:list-item>
        <text:list-item>
          <text:p text:style-name="P5"><text:span text:style-name="T3">quando solicitado, reproduzir áudio conforme o texto fornecido e as configurações de áudio;</text:span></text:p>
        </text:list-item>
        <text:list-item>
          <text:p text:style-name="P5"><text:span text:style-name="T3">exibir na interface o próximo elemento a ser lido.</text:span></text:p>
        </text:list-item>
      </text:list>
      <text:h text:style-name="Heading_20_2" text:outline-level="2">1.4 <text:s text:c="2"/>Novos requisitos — Fase 2</text:h>
      <text:p text:style-name="P6"><text:span text:style-name="T3">Os requisitos abaixo foram acrescidos em decorrência das quatro mudanças especificadas no enunciado da Fase 2.</text:span></text:p>
      <text:h text:style-name="Heading_20_3" text:outline-level="3">Mudança 1 — Entrada e edição de arquivo de texto</text:h>
      <text:list text:continue-numbering="true" text:style-name="WWNum2">
        <text:list-item>
          <text:p text:style-name="P5"><text:span text:style-name="T3">[F] O sistema deve permitir carregar texto a partir de um arquivo “.txt” selecionado pelo usuário.</text:span></text:p>
        </text:list-item>
        <text:list-item>
          <text:p text:style-name="P5"><text:span text:style-name="T3">[F] Caso o texto tenha sido carregado de um arquivo e o usuário o modifique no campo de texto, o sistema deve oferecer a opção de salvar o conteúdo atual sobrescrevendo o arquivo original.</text:span></text:p>
        </text:list-item>
      </text:list>
      <text:h text:style-name="Heading_20_3" text:outline-level="3">Mudança 2 — Exportação MIDI</text:h>
      <text:list text:continue-numbering="true" text:style-name="WWNum2">
        <text:list-item>
          <text:p text:style-name="P5"><text:span text:style-name="T3">[F] O sistema deve ser capaz de exportar a música gerada como arquivo “.mid”.</text:span></text:p>
        </text:list-item>
        <text:list-item>
          <text:p text:style-name="P5"><text:soft-page-break/><text:span text:style-name="T3">[F] O usuário deve poder escolher o nome e o diretório do arquivo MIDI exportado.</text:span></text:p>
        </text:list-item>
        <text:list-item>
          <text:p text:style-name="P5"><text:span text:style-name="T3">[NF] O arquivo MIDI exportado deve ser compatível com o padrão MIDI 1.0.</text:span></text:p>
        </text:list-item>
      </text:list>
      <text:h text:style-name="Heading_20_3" text:outline-level="3">Mudança 3 — Instrumentos General MIDI</text:h>
      <text:list text:continue-numbering="true" text:style-name="WWNum2">
        <text:list-item>
          <text:p text:style-name="P5"><text:span text:style-name="T3">[F] O conjunto de instrumentos disponíveis deve cobrir os 128 instrumentos do padrão General MIDI.</text:span></text:p>
        </text:list-item>
        <text:list-item>
          <text:p text:style-name="P5"><text:span text:style-name="T3">[NF] Cada instrumento deve ser identificado pelo seu número GM e nome correspondente.</text:span></text:p>
        </text:list-item>
      </text:list>
      <text:h text:style-name="Heading_20_3" text:outline-level="3">Mudança 4 — Mapeamento de fuga (polifonia)</text:h>
      <text:list text:continue-numbering="true" text:style-name="WWNum2">
        <text:list-item>
          <text:p text:style-name="P5"><text:span text:style-name="T3">[F] Cada linha do texto de entrada deve ser interpretada como uma voz musical independente.</text:span></text:p>
        </text:list-item>
        <text:list-item>
          <text:p text:style-name="P5"><text:span text:style-name="T3">[F] Cada voz deve receber automaticamente uma oitava base de acordo com sua posição (V0 = 6, V1 = 5, V2 = 4, V3 = 3, ciclando).</text:span></text:p>
        </text:list-item>
        <text:list-item>
          <text:p text:style-name="P5"><text:span text:style-name="T3">[F] Cada voz deve receber automaticamente um volume base de acordo com sua posição (V0 = 100, V1 = 80, V2 = 60, V3 = 40, ciclando).</text:span></text:p>
        </text:list-item>
        <text:list-item>
          <text:p text:style-name="P5"><text:span text:style-name="T3">[F] Cada voz deve receber automaticamente um instrumento base de acordo com sua posição (V0 = Cravo GM 6, V1 = Órgão GM 20, V2 = Piano GM 0, V3 = Fagote GM 70).</text:span></text:p>
        </text:list-item>
        <text:list-item>
          <text:p text:style-name="P5"><text:span text:style-name="T3">[F] O usuário deve poder configurar o instrumento inicial de cada voz pela interface.</text:span></text:p>
        </text:list-item>
        <text:list-item>
          <text:p text:style-name="P5"><text:span text:style-name="T3">[F] A sintaxe [n] no início de uma linha deve indicar um atraso de n beats antes de a voz começar a tocar.</text:span></text:p>
        </text:list-item>
        <text:list-item>
          <text:p text:style-name="P5"><text:span text:style-name="T3">[F] O caractere ‘&gt;’ deve aumentar o BPM global em 10; o caractere ‘&lt;’ deve diminuí-lo em 10.</text:span></text:p>
        </text:list-item>
        <text:list-item>
          <text:p text:style-name="P5"><text:span text:style-name="T3">[F] Os caracteres ‘?’ (sobe oitava) e ‘V’ (desce oitava) devem agir localmente sobre a voz da linha, não globalmente.</text:span></text:p>
        </text:list-item>
        <text:list-item>
          <text:p text:style-name="P5"><text:span text:style-name="T3">[F] O caractere ‘Mb’ deve ser mapeado para a nota Mi bemol.</text:span></text:p>
        </text:list-item>
        <text:list-item>
          <text:p text:style-name="P5"><text:span text:style-name="T3">[F] O caractere ‘H’ deve ser mapeado para Si bemol.</text:span></text:p>
        </text:list-item>
        <text:list-item>
          <text:p text:style-name="P5"><text:span text:style-name="T3">[F] As vozes devem ser reproduzidas simultaneamente, gerando polifonia.</text:span></text:p>
        </text:list-item>
        <text:list-item>
          <text:p text:style-name="P5"><text:span text:style-name="T3">[NF] A arquitetura deve suportar de 2 a 5 vozes simultâneas sem degradação perceptível.</text:span></text:p>
        </text:list-item>
      </text:list>
      <text:p text:style-name="Standard"/>
      <text:h text:style-name="P7" text:outline-level="1">2 <text:s text:c="2"/>Interface com o usuário (GUI)</text:h>
      <text:p text:style-name="P3"><text:span text:style-name="T3">A interface da Fase 2 mantém a estrutura de quatro seções da Fase 1 (superior, esquerda, direita e inferior), incorporando os elementos necessários para suportar as novas funcionalidades.</text:span></text:p>
      <text:h text:style-name="Heading_20_2" text:outline-level="2">2.1 <text:s text:c="2"/>Descrição geral do leiaute</text:h>
      <text:h text:style-name="Heading_20_3" text:outline-level="3">2.1.1 <text:s text:c="2"/>Seção superior</text:h>
      <text:p text:style-name="P4"><text:span text:style-name="T3">O topbar permanece inalterado, dispondo de:</text:span></text:p>
      <text:list text:continue-numbering="true" text:style-name="WWNum2">
        <text:list-item>
          <text:p text:style-name="P5"><text:span text:style-name="T3">um nome para o aplicativo;</text:span></text:p>
        </text:list-item>
        <text:list-item>
          <text:p text:style-name="P5"><text:span text:style-name="T3">uma opção de consulta ao mapeamento “caractere → evento”.</text:span></text:p>
        </text:list-item>
      </text:list>
      <text:h text:style-name="Heading_20_3" text:outline-level="3">2.1.2 <text:s text:c="2"/>Seção à esquerda</text:h>
      <text:p text:style-name="P4"><text:span text:style-name="T3">A seção à esquerda é dedicada à entrada de texto. Nela deverá haver:</text:span></text:p>
      <text:list text:continue-numbering="true" text:style-name="WWNum2">
        <text:list-item>
          <text:p text:style-name="P5"><text:span text:style-name="T3">um campo de texto com numeração de linhas e rótulos de voz (V0, V1, V2…) à esquerda de cada linha, indicando visualmente a qual voz cada linha corresponde;</text:span></text:p>
        </text:list-item>
        <text:list-item>
          <text:p text:style-name="P5"><text:span text:style-name="T3">uma descrição do espaço de texto usado — [n.º de car. escritos]/[n.º de car. limite];</text:span></text:p>
        </text:list-item>
        <text:list-item>
          <text:p text:style-name="P5"><text:span text:style-name="T3">um botão para carregar um arquivo “.txt” como texto fonte;</text:span></text:p>
        </text:list-item>
        <text:list-item>
          <text:p text:style-name="P5"><text:span text:style-name="T3">um botão para salvar o texto atual sobrescrevendo o arquivo “.txt” original (ativo apenas quando um arquivo foi previamente carregado);</text:span></text:p>
        </text:list-item>
        <text:list-item>
          <text:p text:style-name="P5"><text:span text:style-name="T3">um botão para apagar todo o texto no campo de escrita.</text:span></text:p>
        </text:list-item>
      </text:list>
      <text:p text:style-name="P8"><text:span text:style-name="T3">A exibição das vozes como linhas numeradas foi escolhida por manter o campo de texto livre e editável, sem fragmentar a entrada em abas ou painéis separados. O usuário visualiza a estrutura de fuga diretamente no texto que digita.</text:span></text:p>
      <text:h text:style-name="Heading_20_3" text:outline-level="3">2.1.3 <text:s text:c="2"/>Seção à direita</text:h>
      <text:p text:style-name="P4"><text:span text:style-name="T3">Na seção à direita estarão as configurações do sistema:</text:span></text:p>
      <text:list text:continue-numbering="true" text:style-name="WWNum2">
        <text:list-item>
          <text:p text:style-name="P5"><text:span text:style-name="T3">parâmetros globais: barra de volume com controle deslizante e campo numérico de BPM;</text:span></text:p>
        </text:list-item>
        <text:list-item>
          <text:p text:style-name="P5"><text:span text:style-name="T3">padrões por voz: um menu dropdown de seleção de instrumento para cada voz (V0 a V3), pré-configurados com os instrumentos barrocos padrão;</text:span></text:p>
        </text:list-item>
        <text:list-item>
          <text:p text:style-name="P5"><text:span text:style-name="T3">grade de seleção do tema visual;</text:span></text:p>
        </text:list-item>
        <text:list-item>
          <text:p text:style-name="P5"><text:span text:style-name="T3">botão de restaurar padrão.</text:span></text:p>
        </text:list-item>
      </text:list>
      <text:p text:style-name="P8"><text:span text:style-name="T3">Optou-se por expor apenas o instrumento por voz, mantendo oitava e volume como parâmetros automáticos. Essa decisão simplifica a interface sem remover funcionalidade essencial, visto que oitava e volume são definidos pelo mapeamento de fuga e podem ser ajustados via caracteres no próprio texto.</text:span></text:p>
      <text:h text:style-name="Heading_20_3" text:outline-level="3">2.1.4 <text:s text:c="2"/>Seção inferior</text:h>
      <text:p text:style-name="P4"><text:span text:style-name="T3">A playbar mantém os controles de reprodução da Fase 1 e incorpora:</text:span></text:p>
      <text:list text:continue-numbering="true" text:style-name="WWNum2">
        <text:list-item>
          <text:p text:style-name="P5"><text:span text:style-name="T3">botões de play/pause e stop;</text:span></text:p>
        </text:list-item>
        <text:list-item>
          <text:p text:style-name="P5"><text:span text:style-name="T3">barra de progresso indicando a voz e o caractere sendo lido no momento, além do número de vozes ativas;</text:span></text:p>
        </text:list-item>
        <text:list-item>
          <text:p text:style-name="P5"><text:span text:style-name="T3">exibição do próximo caractere a ser lido e o evento que ele desencadeia, com indicação da voz;</text:span></text:p>
        </text:list-item>
        <text:list-item>
          <text:p text:style-name="P5"><text:span text:style-name="T3">botão para exportar o texto como arquivo “.txt”;</text:span></text:p>
        </text:list-item>
        <text:list-item>
          <text:p text:style-name="P5"><text:span text:style-name="T3">botão para exportar a música gerada como arquivo “.mid”.</text:span></text:p>
        </text:list-item>
      </text:list>
      <text:p text:style-name="P8"><text:span text:style-name="T3">A exportação MIDI foi posicionada na playbar, junto ao botão de exportar “.txt”, por ambos serem ações de saída realizadas após a reprodução.</text:span></text:p>
      <text:h text:style-name="Heading_20_2" text:outline-level="2"><text:soft-page-break/>2.2 <text:s text:c="2"/>Croqui</text:h>
      <text:p text:style-name="P3"><text:span text:style-name="T3">A Figura 1 ilustra o leiaute conceitual atualizado. As principais adições em relação à Fase 1 são: coluna de rótulos de voz no campo de texto, seção de padrões por voz no painel direito, botão “Salvar .txt” e botão “Exportar .mid” na playbar.</text:span></text:p>
      <text:p text:style-name="P9"/>
      <text:p text:style-name="P9"/>
      <text:p text:style-name="P9"><draw:frame draw:style-name="fr1" draw:name="Figura1" text:anchor-type="char" svg:x="1.559cm" svg:y="-0.06cm" svg:width="12.723cm" svg:height="12.072cm" draw:z-index="0"><draw:image xlink:href="Pictures/100000010000029900000277CF4EDA5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4">Figura 1: Ilustração do l</text:span><text:span text:style-name="T5">ayout</text:span><text:span text:style-name="T4"> conceitual</text:span></text:p>
      <text:p text:style-name="Standard"/>
      <text:h text:style-name="P7" text:outline-level="1">3 <text:s text:c="2"/>Classes</text:h>
      <text:p text:style-name="P3"><text:span text:style-name="T3">O projeto continua desenhado de acordo com os paradigmas de Object-Oriented Programming (OOP) e os princípios SOLID. A Fase 2 acrescenta novas classes e modifica algumas existentes para suportar polifonia, exportação MIDI e o mapeamento de fuga. As classes são categorizadas a seguir como inalteradas, modificadas e novas.</text:span></text:p>
      <text:h text:style-name="Heading_20_2" text:outline-level="2">3.1 <text:s text:c="2"/>Classes inalteradas</text:h>
      <text:p text:style-name="P6"><text:span text:style-name="T3">As classes abaixo permanecem com suas responsabilidades e interfaces internas sem modificações em relação à Fase 1.</text:span></text:p>
      <text:h text:style-name="Heading_20_3" text:outline-level="3">AudioVolume</text:h>
      <text:p text:style-name="P12"><text:span text:style-name="T3">Encapsula o volume de áudio (0–100). Métodos get/set com clamp automático, mute/unmute e reset.</text:span></text:p>
      <text:h text:style-name="Heading_20_3" text:outline-level="3">AudioBPM</text:h>
      <text:p text:style-name="P12"><text:span text:style-name="T3">Encapsula o BPM (30–240). Métodos get/set com clamp automático e reset.</text:span></text:p>
      <text:h text:style-name="Heading_20_3" text:outline-level="3">AudioOctave</text:h>
      <text:p text:style-name="P12"><text:span text:style-name="T3">Encapsula a oitava (1–8). Métodos get/set e reset.</text:span></text:p>
      <text:h text:style-name="Heading_20_3" text:outline-level="3">AudioParameters</text:h>
      <text:p text:style-name="P12"><text:span text:style-name="T3">Agrega AudioVolume, AudioBPM, AudioInstrument e AudioOctave. Método resetToDefaultAll().</text:span></text:p>
      <text:h text:style-name="Heading_20_3" text:outline-level="3">Score</text:h>
      <text:p text:style-name="P12"><text:span text:style-name="T3">Sequência ordenada de objetos AudioEvent de uma única voz. Métodos para acessar o próximo evento, reiniciar e verificar conclusão.</text:span></text:p>
      <text:h text:style-name="Heading_20_3" text:outline-level="3">NoteEvent</text:h>
      <text:p text:style-name="P12"><text:span text:style-name="T3">Executa uma nota musical conforme os parâmetros atuais do contexto de reprodução.</text:span></text:p>
      <text:h text:style-name="Heading_20_3" text:outline-level="3">SilenceEvent</text:h>
      <text:p text:style-name="P12"><text:span text:style-name="T3">Introduz uma pausa de duração determinada na reprodução.</text:span></text:p>
      <text:h text:style-name="Heading_20_3" text:outline-level="3">PlaybackContext</text:h>
      <text:p text:style-name="P12"><text:span text:style-name="T3">Encapsula o estado atual da execução: AudioParameters e referência à AudioEngine.</text:span></text:p>
      <text:h text:style-name="Heading_20_3" text:outline-level="3">AudioEngine</text:h>
      <text:p text:style-name="P12"><text:span text:style-name="T3">Interface abstrata de saída de áudio. Métodos virtuais para reproduzir nota e gerar silêncio.</text:span></text:p>
      <text:h text:style-name="Heading_20_3" text:outline-level="3">MainController</text:h>
      <text:p text:style-name="P12"><text:span text:style-name="T3">Coordena a interação entre TextInput, TextToEventMapper, FugueScore e AudioPlayer.</text:span></text:p>
      <text:h text:style-name="Heading_20_2" text:outline-level="2">3.2 <text:s text:c="2"/>Classes modificadas</text:h>
      <text:p text:style-name="P6"><text:span text:style-name="T3">As classes abaixo têm suas responsabilidades expandidas para suportar as novas funcionalidades.</text:span></text:p>
      <text:h text:style-name="Heading_20_3" text:outline-level="3">AudioInstrument</text:h>
      <text:p text:style-name="P12"><text:span text:style-name="T3">Passa a suportar os 128 instrumentos do padrão General MIDI, com nome e número GM associados a cada valor. O método nameMIDI é substituído por uma tabela estática dos nomes oficiais GM.</text:span></text:p>
      <text:h text:style-name="Heading_20_3" text:outline-level="3">TextInput</text:h>
      <text:p text:style-name="P13"><text:span text:style-name="T3">Mantém buffer de string e métodos da Fase 1. Acrescenta:</text:span></text:p>
      <text:list text:continue-numbering="true" text:style-name="WWNum2">
        <text:list-item>
          <text:p text:style-name="P5"><text:span text:style-name="T3">referência ao caminho do arquivo carregado;</text:span></text:p>
        </text:list-item>
        <text:list-item>
          <text:p text:style-name="P5"><text:soft-page-break/><text:span text:style-name="T3">método saveToFile(), que sobrescreve o arquivo original com o conteúdo atual do buffer.</text:span></text:p>
        </text:list-item>
      </text:list>
      <text:h text:style-name="Heading_20_3" text:outline-level="3">TextToEventMapper</text:h>
      <text:p text:style-name="P12"><text:span text:style-name="T3">Passa a processar o texto linha por linha, delegando cada linha a um VoiceParser. Produz uma FugueScore em vez de uma Score única.</text:span></text:p>
      <text:h text:style-name="Heading_20_3" text:outline-level="3">AudioPlayer</text:h>
      <text:p text:style-name="P13"><text:span text:style-name="T3">Passa a gerenciar uma FugueScore em vez de uma Score única. Coordena a reprodução simultânea das vozes, respeitando os atrasos de entrada especificados pela sintaxe [n]. Acrescenta:</text:span></text:p>
      <text:list text:continue-numbering="true" text:style-name="WWNum2">
        <text:list-item>
          <text:p text:style-name="P5"><text:span text:style-name="T3">estado de reprodução por voz (playing, paused, stopped);</text:span></text:p>
        </text:list-item>
        <text:list-item>
          <text:p text:style-name="P5"><text:span text:style-name="T3">métodos play, pause, stop e avanço na sequência de eventos de cada voz.</text:span></text:p>
        </text:list-item>
      </text:list>
      <text:h text:style-name="Heading_20_3" text:outline-level="3">InstrumentChangeEvent</text:h>
      <text:p text:style-name="P12"><text:span text:style-name="T3">Ao ser executado, passa a atualizar o instrumento apenas no PlaybackContext da voz atual, não globalmente.</text:span></text:p>
      <text:h text:style-name="Heading_20_3" text:outline-level="3">OctaveChangeEvent</text:h>
      <text:p text:style-name="P12"><text:span text:style-name="T3">Ao ser executado, passa a atualizar a oitava apenas no PlaybackContext da voz atual, não globalmente.</text:span></text:p>
      <text:h text:style-name="Heading_20_2" text:outline-level="2">3.3 <text:s text:c="2"/>Classes novas</text:h>
      <text:p text:style-name="P6"><text:span text:style-name="T3">As classes abaixo são criadas para suportar as funcionalidades da Fase 2.</text:span></text:p>
      <text:h text:style-name="Heading_20_3" text:outline-level="3">Voice</text:h>
      <text:p text:style-name="P13"><text:span text:style-name="T3">Representa uma voz musical independente, correspondente a uma linha do texto de entrada. É composta por:</text:span></text:p>
      <text:list text:continue-numbering="true" text:style-name="WWNum2">
        <text:list-item>
          <text:p text:style-name="P5"><text:span text:style-name="T3">índice da voz (0, 1, 2…);</text:span></text:p>
        </text:list-item>
        <text:list-item>
          <text:p text:style-name="P5"><text:span text:style-name="T3">AudioParameters próprios (oitava, volume e instrumento base da voz);</text:span></text:p>
        </text:list-item>
        <text:list-item>
          <text:p text:style-name="P5"><text:span text:style-name="T3">Score própria (sequência de eventos da linha);</text:span></text:p>
        </text:list-item>
        <text:list-item>
          <text:p text:style-name="P5"><text:span text:style-name="T3">atraso de entrada em beats, extraído da sintaxe [n].</text:span></text:p>
        </text:list-item>
      </text:list>
      <text:h text:style-name="Heading_20_3" text:outline-level="3">VoiceParser</text:h>
      <text:p text:style-name="P12"><text:span text:style-name="T3">Responsável por converter uma linha de texto em um objeto Voice. Extrai o atraso [n] do início da linha, inicializa os AudioParameters corretos para o índice da voz e processa os caracteres da linha produzindo a Score da voz.</text:span></text:p>
      <text:h text:style-name="Heading_20_3" text:outline-level="3">FugueScore</text:h>
      <text:p text:style-name="P13"><text:span text:style-name="T3">Coordena uma lista de objetos Voice. Representa a partitura polifônica completa gerada a partir do texto. Dispõe de métodos para:</text:span></text:p>
      <text:list text:continue-numbering="true" text:style-name="WWNum2">
        <text:list-item>
          <text:p text:style-name="P5"><text:span text:style-name="T3">acessar a lista de vozes;</text:span></text:p>
        </text:list-item>
        <text:list-item>
          <text:p text:style-name="P5"><text:span text:style-name="T3">fornecer ao AudioPlayer a visão sincronizada dos eventos de todas as vozes, considerando os atrasos de entrada.</text:span></text:p>
        </text:list-item>
      </text:list>
      <text:h text:style-name="Heading_20_3" text:outline-level="3">BpmChangeEvent</text:h>
      <text:p text:style-name="P12"><text:span text:style-name="T3">Subtipo de AudioEvent. Representa a mudança de BPM provocada pelos caracteres ‘&gt;’ (acelera +10) e ‘&lt;’ (desacelera −10). Ao ser executado, atualiza o BPM global no PlaybackContext.</text:span></text:p>
      <text:h text:style-name="Heading_20_3" text:outline-level="3">MidiExporter</text:h>
      <text:p text:style-name="P13"><text:span text:style-name="T3">Responsável por exportar uma FugueScore como arquivo “.mid” compatível com o padrão MIDI 1.0. Não reproduz áudio — apenas serializa os eventos em formato binário MIDI. Dispõe de:</text:span></text:p>
      <text:list text:continue-numbering="true" text:style-name="WWNum2">
        <text:list-item>
          <text:p text:style-name="P5"><text:span text:style-name="T3">método exportTo(path): serializa a FugueScore no arquivo indicado;</text:span></text:p>
        </text:list-item>
        <text:list-item>
          <text:p text:style-name="P5"><text:soft-page-break/><text:span text:style-name="T3">cada voz é mapeada para uma trilha MIDI (track) independ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pt" fo:country="BR" style:letter-kerning="false" style:font-name-asian="Times New Roman2" style:font-size-asian="11pt" style:language-asian="zh" style:country-asian="CN" style:font-name-complex="Times New Roman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pt" fo:country="BR" style:letter-kerning="false" style:font-name-asian="Times New Roman2" style:font-size-asian="11pt" style:language-asian="zh" style:country-asian="CN" style:font-name-complex="Times New Roman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141cm" style:contextual-spacing="false"/>
      <style:text-properties style:font-name="Times New Roman1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282cm" fo:margin-bottom="0.106cm" style:contextual-spacing="false"/>
      <style:text-properties style:font-name="Times New Roman1" fo:font-family="'Times New Roman'" style:font-family-generic="swiss" style:font-pitch="variable" fo:font-size="11pt" fo:font-style="italic" fo:font-weight="bold" style:font-name-asian="Times New Roman2" style:font-family-asian="'Times New Roman'" style:font-family-generic-asian="system" style:font-pitch-asian="variable" style:font-size-asian="11pt" style:font-style-asian="italic" style:font-weight-asian="bold" style:font-name-complex="Times New Roman2" style:font-family-complex="'Times New Roman'" style:font-family-generic-complex="system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999cm" fo:margin-right="2.9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4-27T17:34:18.367000000</meta:creation-date>
    <dc:date>2026-04-27T15:46:44.899482800</dc:date>
    <meta:editing-duration>PT1M59S</meta:editing-duration>
    <meta:document-statistic meta:table-count="0" meta:image-count="1" meta:object-count="0" meta:page-count="7" meta:paragraph-count="146" meta:word-count="1715" meta:character-count="10413" meta:non-whitespace-character-count="8868"/>
    <meta:generator>LibreOffice/25.8.5.2$Windows_X86_64 LibreOffice_project/9c8b85f387cc00a89945a79c9e6239f32e450ac2</meta:generator>
  </office:meta>
</office:document-meta>
</file>